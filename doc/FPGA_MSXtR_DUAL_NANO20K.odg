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cm" svg:stroke-color="#000000" draw:fill="none" draw:fill-color="#ffffff" draw:textarea-vertical-align="middle" fo:padding-top="0.13cm" fo:padding-bottom="0.13cm" fo:padding-left="0.255cm" fo:padding-right="0.255cm" loext:decorative="false"/>
    </style:style>
    <style:style style:name="gr2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75cm" fo:min-width="1cm" fo:padding-top="0.13cm" fo:padding-bottom="0.13cm" fo:padding-left="0.255cm" fo:padding-right="0.255cm" loext:decorative="false"/>
      <style:paragraph-properties style:writing-mode="lr-tb"/>
    </style:style>
    <style:style style:name="gr3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74cm" fo:min-width="0.99cm" fo:padding-top="0.13cm" fo:padding-bottom="0.13cm" fo:padding-left="0.255cm" fo:padding-right="0.255cm" loext:decorative="false"/>
      <style:paragraph-properties style:writing-mode="lr-tb"/>
    </style:style>
    <style:style style:name="gr4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74cm" fo:min-width="7.39cm" fo:padding-top="0.13cm" fo:padding-bottom="0.13cm" fo:padding-left="0.255cm" fo:padding-right="0.255cm" loext:decorative="false"/>
      <style:paragraph-properties style:writing-mode="lr-tb"/>
    </style:style>
    <style:style style:name="gr5" style:family="graphic" style:parent-style-name="objectwithoutfill">
      <style:graphic-properties svg:stroke-width="0.15cm" svg:stroke-color="#000000" draw:marker-start-width="0.41cm" draw:marker-end-width="0.41cm" draw:fill="none" draw:textarea-vertical-align="middle" fo:padding-top="0.2cm" fo:padding-bottom="0.2cm" fo:padding-left="0.325cm" fo:padding-right="0.325cm" loext:decorative="false"/>
    </style:style>
    <style:style style:name="gr6" style:family="graphic" style:parent-style-name="standard">
      <style:graphic-properties svg:stroke-width="0.01cm" svg:stroke-color="#000000" draw:fill="none" draw:fill-color="#ffffff" draw:textarea-horizontal-align="justify" draw:textarea-vertical-align="middle" draw:auto-grow-height="false" fo:min-height="7.54cm" fo:min-width="9.79cm" fo:padding-top="0.13cm" fo:padding-bottom="0.13cm" fo:padding-left="0.255cm" fo:padding-right="0.255cm" loext:decorative="false"/>
    </style:style>
    <style:style style:name="gr7" style:family="graphic" style:parent-style-name="standard">
      <style:graphic-properties svg:stroke-width="0.01cm" svg:stroke-color="#000000" draw:fill="none" draw:fill-color="#ffffff" draw:textarea-horizontal-align="justify" draw:textarea-vertical-align="middle" draw:auto-grow-height="false" fo:min-height="7.54cm" fo:min-width="6.29cm" fo:padding-top="0.13cm" fo:padding-bottom="0.13cm" fo:padding-left="0.255cm" fo:padding-right="0.255cm" loext:decorative="false"/>
    </style:style>
    <style:style style:name="gr8" style:family="graphic" style:parent-style-name="standard">
      <style:graphic-properties draw:stroke="none" svg:stroke-width="0.01cm" svg:stroke-color="#000000" draw:fill="none" draw:fill-color="#ffffff" draw:auto-grow-height="true" draw:auto-grow-width="false" fo:min-height="0.24cm" fo:padding-top="0.13cm" fo:padding-bottom="0.13cm" fo:padding-left="0.255cm" fo:padding-right="0.255cm" loext:decorative="false"/>
      <style:paragraph-properties style:writing-mode="lr-tb"/>
    </style:style>
    <style:style style:name="gr9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1.44cm" fo:min-width="0.99cm" fo:padding-top="0.13cm" fo:padding-bottom="0.13cm" fo:padding-left="0.255cm" fo:padding-right="0.255cm" loext:decorative="false"/>
      <style:paragraph-properties style:writing-mode="lr-tb"/>
    </style:style>
    <style:style style:name="gr10" style:family="graphic" style:parent-style-name="standard">
      <style:graphic-properties draw:stroke="none" svg:stroke-width="0.01cm" svg:stroke-color="#000000" draw:fill="none" draw:fill-color="#ffffff" draw:auto-grow-height="true" draw:auto-grow-width="false" fo:min-height="0cm" fo:padding-top="0.13cm" fo:padding-bottom="0.13cm" fo:padding-left="0.255cm" fo:padding-right="0.255cm" loext:decorative="false"/>
      <style:paragraph-properties style:writing-mode="lr-tb"/>
    </style:style>
    <style:style style:name="gr11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74cm" fo:min-width="5.79cm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6.3cm" svg:y1="6.175cm" svg:x2="6.3cm" svg:y2="6.475cm">
          <text:p/>
        </draw:line>
        <draw:line draw:style-name="gr1" draw:text-style-name="P1" draw:layer="layout" svg:x1="6.35cm" svg:y1="5.1cm" svg:x2="6.35cm" svg:y2="5.325cm">
          <text:p/>
        </draw:line>
        <draw:line draw:style-name="gr1" draw:text-style-name="P1" draw:layer="layout" svg:x1="4.725cm" svg:y1="5.1cm" svg:x2="4.725cm" svg:y2="5.325cm">
          <text:p/>
        </draw:line>
        <draw:line draw:style-name="gr1" draw:text-style-name="P1" draw:layer="layout" svg:x1="3.125cm" svg:y1="5.1cm" svg:x2="3.125cm" svg:y2="5.325cm">
          <text:p/>
        </draw:line>
        <draw:line draw:style-name="gr1" draw:text-style-name="P1" draw:layer="layout" svg:x1="9.5cm" svg:y1="4cm" svg:x2="9.5cm" svg:y2="5.3cm">
          <text:p/>
        </draw:line>
        <draw:custom-shape draw:style-name="gr2" draw:text-style-name="P3" draw:layer="layout" svg:width="1.5cm" svg:height="1cm" svg:x="2.4cm" svg:y="4.1cm">
          <text:p text:style-name="P2"><text:span text:style-name="T1">cz8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4cm" svg:y="4.1cm">
          <text:p text:style-name="P2"><text:span text:style-name="T1">cr800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95cm" svg:y1="5.1cm" svg:x2="7.95cm" svg:y2="5.325cm">
          <text:p/>
        </draw:line>
        <draw:custom-shape draw:style-name="gr4" draw:text-style-name="P3" draw:layer="layout" svg:width="7.9cm" svg:height="1cm" svg:x="2.4cm" svg:y="5.2cm">
          <text:p text:style-name="P2"><text:span text:style-name="T1">s2026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4cm" svg:y="6.7cm">
          <text:p text:style-name="P2"><text:span text:style-name="T1">dualPSG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.4cm" svg:y1="6.5cm" svg:x2="10.925cm" svg:y2="6.5cm">
          <text:p/>
        </draw:line>
        <draw:custom-shape draw:style-name="gr3" draw:text-style-name="P3" draw:layer="layout" svg:width="1.5cm" svg:height="1cm" svg:x="5.6cm" svg:y="6.7cm">
          <text:p text:style-name="P2"><text:span text:style-name="T1">IKAOPL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5.6cm" svg:y="4.1cm">
          <text:p text:style-name="P2"><text:span text:style-name="T1">Mega</text:span></text:p>
          <text:p text:style-name="P2"><text:span text:style-name="T1">RO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7.2cm" svg:y="4.1cm">
          <text:p text:style-name="P2"><text:span text:style-name="T1">Mapper</text:span></text:p>
          <text:p text:style-name="P2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8.8cm" svg:y="4.1cm">
          <text:p text:style-name="P2"><text:span text:style-name="T1">SDRAM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8.8cm" svg:y="3cm">
          <text:p text:style-name="P2"><text:span text:style-name="T1">SDRA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2.4cm" svg:y="9.6cm">
          <text:p text:style-name="P2"><text:span text:style-name="T1">I/O</text:span></text:p>
          <text:p text:style-name="P2"><text:span text:style-name="T1">Expan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10.9cm" svg:y="6cm">
          <text:p text:style-name="P2"><text:span text:style-name="T1">FPGA</text:span></text:p>
          <text:p text:style-name="P2"><text:span text:style-name="T1">Connec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13.025cm" svg:y="6cm">
          <text:p text:style-name="P2"><text:span text:style-name="T1">FPGA</text:span></text:p>
          <text:p text:style-name="P2"><text:span text:style-name="T1">Connect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4cm" svg:y1="6.5cm" svg:x2="13.025cm" svg:y2="6.5cm">
          <text:p/>
        </draw:line>
        <draw:line draw:style-name="gr1" draw:text-style-name="P1" draw:layer="layout" svg:x1="15.95cm" svg:y1="6.5cm" svg:x2="15.95cm" svg:y2="9cm">
          <text:p/>
        </draw:line>
        <draw:line draw:style-name="gr1" draw:text-style-name="P1" draw:layer="layout" svg:x1="15.95cm" svg:y1="6.1cm" svg:x2="15.95cm" svg:y2="6.5cm">
          <text:p/>
        </draw:line>
        <draw:line draw:style-name="gr5" draw:text-style-name="P4" draw:layer="layout" svg:x1="14.525cm" svg:y1="6.5cm" svg:x2="20.1cm" svg:y2="6.5cm">
          <text:p/>
        </draw:line>
        <draw:custom-shape draw:style-name="gr3" draw:text-style-name="P3" draw:layer="layout" svg:width="1.5cm" svg:height="1cm" svg:x="15.2cm" svg:y="5.1cm">
          <text:p text:style-name="P2"><text:span text:style-name="T1">PPI</text:span></text:p>
          <text:p text:style-name="P2"><text:span text:style-name="T1">SLOT</text:span><text:span text:style-name="T1">以外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15.2cm" svg:y="6.7cm">
          <text:p text:style-name="P2"><text:span text:style-name="T1">V996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15.2cm" svg:y="7.8cm">
          <text:p text:style-name="P2"><text:span text:style-name="T1">SDRAM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15.2cm" svg:y="8.9cm">
          <text:p text:style-name="P2"><text:span text:style-name="T1">SDRAM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125cm" svg:y1="6.475cm" svg:x2="3.125cm" svg:y2="9.6cm">
          <text:p/>
        </draw:line>
        <draw:line draw:style-name="gr1" draw:text-style-name="P1" draw:layer="layout" svg:x1="6.3cm" svg:y1="6.475cm" svg:x2="6.3cm" svg:y2="6.7cm">
          <text:p/>
        </draw:line>
        <draw:line draw:style-name="gr1" draw:text-style-name="P1" draw:layer="layout" svg:x1="4.7cm" svg:y1="6.475cm" svg:x2="4.7cm" svg:y2="6.7cm">
          <text:p/>
        </draw:line>
        <draw:custom-shape draw:style-name="gr6" draw:text-style-name="P1" draw:layer="layout" svg:width="10.3cm" svg:height="7.8cm" svg:x="2.2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18.1cm" svg:y="6cm">
          <text:p text:style-name="P2"><text:span text:style-name="T1">SPI</text:span></text:p>
          <text:p text:style-name="P2"><text:span text:style-name="T1">Connec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20.1cm" svg:y="6cm">
          <text:p text:style-name="P2"><text:span text:style-name="T1">SPI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8cm" svg:height="7.8cm" svg:x="12.9cm" svg:y="2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8cm" svg:height="7.8cm" svg:x="20cm" svg:y="2.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3cm" svg:height="0.737cm" svg:x="2.2cm" svg:y="2.8cm">
          <draw:text-box>
            <text:p text:style-name="P5"><text:span text:style-name="T1">TangNano20K </text:span></text:p>
            <text:p text:style-name="P5"><text:span text:style-name="T1">FPGA (CPU)</text:span></text:p>
          </draw:text-box>
        </draw:frame>
        <draw:frame draw:style-name="gr8" draw:text-style-name="P6" draw:layer="layout" svg:width="4.3cm" svg:height="0.737cm" svg:x="12.9cm" svg:y="2.8cm">
          <draw:text-box>
            <text:p text:style-name="P5"><text:span text:style-name="T1">TangNano20K </text:span></text:p>
            <text:p text:style-name="P5"><text:span text:style-name="T1">FPGA (VDP)</text:span></text:p>
          </draw:text-box>
        </draw:frame>
        <draw:frame draw:style-name="gr8" draw:text-style-name="P6" draw:layer="layout" svg:width="4.3cm" svg:height="0.5cm" svg:x="20cm" svg:y="2.8cm">
          <draw:text-box>
            <text:p text:style-name="P5"><text:span text:style-name="T1">MCU</text:span></text:p>
          </draw:text-box>
        </draw:frame>
        <draw:custom-shape draw:style-name="gr3" draw:text-style-name="P3" draw:layer="layout" svg:width="1.5cm" svg:height="1cm" svg:x="10.9cm" svg:y="9.6cm">
          <text:p text:style-name="P2"><text:span text:style-name="T1">I2S</text:span></text:p>
          <text:p text:style-name="P2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13.025cm" svg:y="9.6cm">
          <text:p text:style-name="P2"><text:span text:style-name="T1">I2S</text:span></text:p>
          <text:p text:style-name="P2"><text:span text:style-name="T1">In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4cm" svg:y1="10.1cm" svg:x2="13.025cm" svg:y2="10.1cm">
          <text:p/>
        </draw:line>
        <draw:line draw:style-name="gr1" draw:text-style-name="P1" draw:layer="layout" svg:x1="17.625cm" svg:y1="7.2cm" svg:x2="17.625cm" svg:y2="8.9cm">
          <text:p/>
        </draw:line>
        <draw:custom-shape draw:style-name="gr3" draw:text-style-name="P3" draw:layer="layout" svg:width="1.5cm" svg:height="1cm" svg:x="16.9cm" svg:y="7.8cm">
          <text:p text:style-name="P2"><text:span text:style-name="T1">Video</text:span></text:p>
          <text:p text:style-name="P2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5cm" svg:height="1.7cm" svg:x="16.9cm" svg:y="8.9cm">
          <text:p text:style-name="P2"><text:span text:style-name="T1">HDMI_TX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.7cm" svg:y1="7.2cm" svg:x2="17.625cm" svg:y2="7.2cm">
          <text:p/>
        </draw:line>
        <draw:line draw:style-name="gr1" draw:text-style-name="P1" draw:layer="layout" svg:x1="14.525cm" svg:y1="10.1cm" svg:x2="16.9cm" svg:y2="10.1cm">
          <text:p/>
        </draw:line>
        <draw:frame draw:style-name="gr10" draw:text-style-name="P8" draw:layer="layout" svg:width="1.5cm" svg:height="0.499cm" svg:x="16.9cm" svg:y="10.613cm">
          <draw:text-box>
            <text:p text:style-name="P7"><text:span text:style-name="T1">HDMI</text:span></text:p>
          </draw:text-box>
        </draw:frame>
        <draw:custom-shape draw:style-name="gr3" draw:text-style-name="P3" draw:layer="layout" svg:width="1.5cm" svg:height="1cm" svg:x="23cm" svg:y="3.4cm">
          <text:p text:style-name="P2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23cm" svg:y="5.6cm">
          <text:p text:style-name="P2"><text:span text:style-name="T1">Network</text:span></text:p>
          <text:p text:style-name="P2"><text:span text:style-name="T1">(Option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23cm" svg:y="6.7cm">
          <text:p text:style-name="P2"><text:span text:style-name="T1">TF Card</text:span></text:p>
          <text:p text:style-name="P2"><text:span text:style-name="T1">(Option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23cm" svg:y="4.5cm">
          <text:p text:style-name="P2"><text:span text:style-name="T1">OSD</text:span></text:p>
          <text:p text:style-name="P2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23cm" svg:y="7.8cm">
          <text:p text:style-name="P2"><text:span text:style-name="T1">UART</text:span></text:p>
          <text:p text:style-name="P2"><text:span text:style-name="T1">(Option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23cm" svg:y="8.9cm">
          <text:p text:style-name="P2"><text:span text:style-name="T1">I2C</text:span></text:p>
          <text:p text:style-name="P2"><text:span text:style-name="T1">(Option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svg:x="7.2cm" svg:y="6.7cm">
          <text:p text:style-name="P2"><text:span text:style-name="T1">PCM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9cm" svg:y1="6.475cm" svg:x2="7.9cm" svg:y2="6.7cm">
          <text:p/>
        </draw:line>
        <draw:custom-shape draw:style-name="gr3" draw:text-style-name="P3" draw:layer="layout" svg:width="1.5cm" svg:height="1cm" svg:x="8.8cm" svg:y="6.7cm">
          <text:p text:style-name="P2"><text:span text:style-name="T1">PPI</text:span></text:p>
          <text:p text:style-name="P2"><text:span text:style-name="T1">1bit click soun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5cm" svg:y1="6.475cm" svg:x2="9.5cm" svg:y2="6.7cm">
          <text:p/>
        </draw:line>
        <draw:line draw:style-name="gr1" draw:text-style-name="P1" draw:layer="layout" svg:x1="7.95cm" svg:y1="7.7cm" svg:x2="7.95cm" svg:y2="7.925cm">
          <text:p/>
        </draw:line>
        <draw:line draw:style-name="gr1" draw:text-style-name="P1" draw:layer="layout" svg:x1="6.325cm" svg:y1="7.7cm" svg:x2="6.325cm" svg:y2="7.925cm">
          <text:p/>
        </draw:line>
        <draw:line draw:style-name="gr1" draw:text-style-name="P1" draw:layer="layout" svg:x1="4.725cm" svg:y1="7.7cm" svg:x2="4.725cm" svg:y2="7.925cm">
          <text:p/>
        </draw:line>
        <draw:line draw:style-name="gr1" draw:text-style-name="P1" draw:layer="layout" svg:x1="9.55cm" svg:y1="7.7cm" svg:x2="9.55cm" svg:y2="7.925cm">
          <text:p/>
        </draw:line>
        <draw:custom-shape draw:style-name="gr11" draw:text-style-name="P3" draw:layer="layout" svg:width="6.3cm" svg:height="1cm" svg:x="4cm" svg:y="7.8cm">
          <text:p text:style-name="P2"><text:span text:style-name="T1">Sound Mix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1cm" svg:y1="8.8cm" svg:x2="7.1cm" svg:y2="10.1cm">
          <text:p/>
        </draw:line>
        <draw:line draw:style-name="gr1" draw:text-style-name="P1" draw:layer="layout" svg:x1="7.1cm" svg:y1="10.1cm" svg:x2="10.9cm" svg:y2="10.1cm">
          <text:p/>
        </draw:line>
        <draw:frame draw:style-name="gr10" draw:text-style-name="P8" draw:layer="layout" svg:width="1.5cm" svg:height="0.737cm" svg:x="2.4cm" svg:y="10.601cm">
          <draw:text-box>
            <text:p text:style-name="P7"><text:span text:style-name="T1">SLOT</text:span></text:p>
            <text:p text:style-name="P7"><text:span text:style-name="T1">JOYPAD</text:span></text:p>
          </draw:text-box>
        </draw:frame>
        <draw:custom-shape draw:style-name="gr3" draw:text-style-name="P3" draw:layer="layout" svg:width="1.5cm" svg:height="1cm" svg:x="24.6cm" svg:y="5.6cm">
          <text:p text:style-name="P2"><text:span text:style-name="T1">JOYPAD</text:span></text:p>
          <text:p text:style-name="P2"><text:span text:style-name="T1">(Option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5T08:30:48.869202300</meta:creation-date>
    <dc:date>2026-04-05T09:33:32.594272500</dc:date>
    <meta:editing-duration>PT30M36S</meta:editing-duration>
    <meta:editing-cycles>1</meta:editing-cycles>
    <meta:document-statistic meta:object-count="66"/>
    <meta:generator>LibreOffice/25.8.5.2$Windows_X86_64 LibreOffice_project/9c8b85f387cc00a89945a79c9e6239f32e450ac2</meta:generator>
  </office:meta>
</office:document-meta>
</file>